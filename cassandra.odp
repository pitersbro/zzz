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200000199ABB583EB.png" manifest:media-type="image/png"/>
  <manifest:file-entry manifest:full-path="Pictures/10000001000006A2000000DAFC02B736.png" manifest:media-type="image/png"/>
  <manifest:file-entry manifest:full-path="Pictures/100000010000041E000001C154D9F3FE.png" manifest:media-type="image/png"/>
  <manifest:file-entry manifest:full-path="Pictures/10000001000008600000062FE86CA7DB.png" manifest:media-type="image/png"/>
  <manifest:file-entry manifest:full-path="Pictures/10000001000006B4000000FE4732BECA.png" manifest:media-type="image/png"/>
  <manifest:file-entry manifest:full-path="Pictures/10000001000005CE000004C04FA379BC.png" manifest:media-type="image/png"/>
  <manifest:file-entry manifest:full-path="Pictures/10000001000005470000026B1F4D8585.png" manifest:media-type="image/png"/>
  <manifest:file-entry manifest:full-path="Pictures/1000000100000314000000920D39349F.png" manifest:media-type="image/png"/>
  <manifest:file-entry manifest:full-path="Pictures/1000000100000653000000DDCF0071F6.png" manifest:media-type="image/png"/>
  <manifest:file-entry manifest:full-path="Pictures/10000001000004770000018412F1778D.png" manifest:media-type="image/png"/>
  <manifest:file-entry manifest:full-path="Pictures/10000001000005B7000001822C57367E.png" manifest:media-type="image/png"/>
  <manifest:file-entry manifest:full-path="Pictures/10000001000003D30000016657574F36.png" manifest:media-type="image/png"/>
  <manifest:file-entry manifest:full-path="Pictures/10000001000005240000006883DDBDFA.png" manifest:media-type="image/png"/>
  <manifest:file-entry manifest:full-path="Pictures/10000001000005C1000001028C50C4C5.png" manifest:media-type="image/png"/>
  <manifest:file-entry manifest:full-path="Pictures/10000001000002E8000003C1FFC45F0D.png" manifest:media-type="image/png"/>
  <manifest:file-entry manifest:full-path="Pictures/10000001000007AE000000802DEA0674.png" manifest:media-type="image/png"/>
  <manifest:file-entry manifest:full-path="Pictures/1000000100000B20000000EC99F3F1D9.png" manifest:media-type="image/png"/>
  <manifest:file-entry manifest:full-path="Pictures/10000001000004550000019B15CBA144.png" manifest:media-type="image/png"/>
  <manifest:file-entry manifest:full-path="Pictures/100000010000044500000117F23653CB.png" manifest:media-type="image/png"/>
  <manifest:file-entry manifest:full-path="Pictures/10000001000003DD000000F88409E053.png" manifest:media-type="image/png"/>
  <manifest:file-entry manifest:full-path="Pictures/10000001000006B4000000FE10DE818E.png" manifest:media-type="image/png"/>
  <manifest:file-entry manifest:full-path="Pictures/10000001000006C600000182D63CE7C9.png" manifest:media-type="image/png"/>
  <manifest:file-entry manifest:full-path="Pictures/1000000100000680000003E6EE38F65F.png" manifest:media-type="image/png"/>
  <manifest:file-entry manifest:full-path="Pictures/1000000100000B2A00000074B516C9D5.png" manifest:media-type="image/png"/>
  <manifest:file-entry manifest:full-path="Pictures/10000001000004AA0000042DDD9F3095.png" manifest:media-type="image/png"/>
  <manifest:file-entry manifest:full-path="Pictures/10000001000004EB0000012F8CD6D1C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6d" fo:min-height="1.42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6d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141cm" svg:height="3.095cm" svg:x="0.635cm" svg:y="6.35cm">
          <draw:text-box>
            <text:p>2. w przestrzeni kluczy "biblioteka" utwórz rodzinę kolumn o nazwie "ksiazki" zawierającą</text:p>
            <text:p>kolumny: id_ksiazki (klucz główny), isbn, tytul, cena, wydawnictwo, rok</text:p>
          </draw:text-box>
        </draw:frame>
        <draw:frame draw:style-name="gr2" draw:text-style-name="P2" draw:layer="layout" svg:width="14.925cm" svg:height="5.457cm" svg:x="0.635cm" svg:y="9.783cm">
          <draw:image xlink:href="Pictures/10000001000003D30000016657574F36.png" xlink:type="simple" xlink:show="embed" xlink:actuate="onLoad" draw:mime-type="image/png">
            <text:p/>
          </draw:image>
        </draw:frame>
        <draw:frame draw:style-name="gr2" draw:text-style-name="P2" draw:layer="layout" svg:width="22.225cm" svg:height="1.756cm" svg:x="0.635cm" svg:y="2.689cm">
          <draw:image xlink:href="Pictures/10000001000005240000006883DDBDFA.png" xlink:type="simple" xlink:show="embed" xlink:actuate="onLoad" draw:mime-type="image/png">
            <text:p/>
          </draw:image>
        </draw:frame>
        <draw:frame draw:style-name="gr2" draw:text-style-name="P2" draw:layer="layout" svg:width="27.999cm" svg:height="1.822cm" svg:x="0.635cm" svg:y="4.528cm">
          <draw:image xlink:href="Pictures/10000001000007AE000000802DEA0674.png" xlink:type="simple" xlink:show="embed" xlink:actuate="onLoad" draw:mime-type="image/png">
            <text:p/>
          </draw:image>
        </draw:frame>
        <draw:frame draw:style-name="gr3" draw:text-style-name="P1" draw:layer="layout" svg:width="15.141cm" svg:height="1.673cm" svg:x="0.635cm" svg:y="0.942cm">
          <draw:text-box>
            <text:p>1. utwórz nową przestrzeń kluczy o nazwie "biblioteka"</text:p>
          </draw:text-box>
        </draw:frame>
        <draw:frame draw:style-name="gr2" draw:text-style-name="P2" draw:layer="layout" svg:width="6.32cm" svg:height="8.164cm" svg:x="17.78cm" svg:y="7.076cm">
          <draw:image xlink:href="Pictures/10000001000002E8000003C1FFC45F0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1" draw:layer="layout" svg:width="16.235cm" svg:height="1.673cm" svg:x="0.275cm" svg:y="0.635cm">
          <draw:text-box>
            <text:p>3. do rodziny kolumn "ksiazki" wstaw następujące wiersze:</text:p>
          </draw:text-box>
        </draw:frame>
        <draw:frame draw:style-name="gr2" draw:text-style-name="P2" draw:layer="layout" svg:width="27.999cm" svg:height="2.319cm" svg:x="-0.059cm" svg:y="2.54cm">
          <draw:image xlink:href="Pictures/1000000100000B20000000EC99F3F1D9.png" xlink:type="simple" xlink:show="embed" xlink:actuate="onLoad" draw:mime-type="image/png">
            <text:p/>
          </draw:image>
        </draw:frame>
        <draw:frame draw:style-name="gr2" draw:text-style-name="P2" draw:layer="layout" svg:width="24.824cm" svg:height="5.525cm" svg:x="1.846cm" svg:y="5.27cm">
          <draw:image xlink:href="Pictures/10000001000006C600000182D63CE7C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" draw:text-style-name="P1" draw:layer="layout" svg:width="24.944cm" svg:height="2.384cm" svg:x="0.635cm" svg:y="0.791cm">
          <draw:text-box>
            <text:p>4. w przestrzeni kluczy "biblioteka" utwórz rodzinę kolumn o nazwie "autorzy" zawierającą</text:p>
            <text:p>kolumny: id_autora (klucz główny), imie, nazwisko</text:p>
          </draw:text-box>
        </draw:frame>
        <draw:frame draw:style-name="gr3" draw:text-style-name="P1" draw:layer="layout" svg:width="16.412cm" svg:height="1.673cm" svg:x="12.798cm" svg:y="4.445cm">
          <draw:text-box>
            <text:p>5. do rodziny kolumn "autorzy" wstaw następujące wiersze:</text:p>
          </draw:text-box>
        </draw:frame>
        <draw:frame draw:style-name="gr2" draw:text-style-name="P2" draw:layer="layout" svg:width="12.078cm" svg:height="4.299cm" svg:x="0.635cm" svg:y="3.321cm">
          <draw:image xlink:href="Pictures/10000001000003DD000000F88409E053.png" xlink:type="simple" xlink:show="embed" xlink:actuate="onLoad" draw:mime-type="image/png">
            <text:p/>
          </draw:image>
        </draw:frame>
        <draw:frame draw:style-name="gr2" draw:text-style-name="P2" draw:layer="layout" svg:width="14.469cm" svg:height="8.678cm" svg:x="12.836cm" svg:y="6.562cm">
          <draw:image xlink:href="Pictures/1000000100000680000003E6EE38F65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14.703cm" svg:height="5.448cm" svg:x="2.182cm" svg:y="1.598cm">
          <draw:image xlink:href="Pictures/10000001000004550000019B15CBA144.png" xlink:type="simple" xlink:show="embed" xlink:actuate="onLoad" draw:mime-type="image/png">
            <text:p/>
          </draw:image>
        </draw:frame>
        <draw:frame draw:style-name="gr6" draw:text-style-name="P1" draw:layer="layout" svg:width="18.773cm" svg:height="0.963cm" svg:x="2.182cm" svg:y="0.635cm">
          <draw:text-box>
            <text:p>-- 6. wyświetl kolumny id_ksiazki i tytul z rodziny kolumn "ksiazki"</text:p>
          </draw:text-box>
        </draw:frame>
        <draw:frame draw:style-name="gr2" draw:text-style-name="P2" draw:layer="layout" svg:width="19.011cm" svg:height="4.852cm" svg:x="1.309cm" svg:y="10.16cm">
          <draw:image xlink:href="Pictures/100000010000044500000117F23653CB.png" xlink:type="simple" xlink:show="embed" xlink:actuate="onLoad" draw:mime-type="image/png">
            <text:p/>
          </draw:image>
        </draw:frame>
        <draw:frame draw:style-name="gr6" draw:text-style-name="P1" draw:layer="layout" svg:width="15.87cm" svg:height="0.963cm" svg:x="1.275cm" svg:y="8.562cm">
          <draw:text-box>
            <text:p>-- 7. wyświetl wszystkie kolumny książki o id_ksiazki=4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2" draw:layer="layout" svg:width="27.999cm" svg:height="1.135cm" svg:x="0cm" svg:y="2.675cm">
          <draw:image xlink:href="Pictures/1000000100000B2A00000074B516C9D5.png" xlink:type="simple" xlink:show="embed" xlink:actuate="onLoad" draw:mime-type="image/png">
            <text:p/>
          </draw:image>
        </draw:frame>
        <draw:frame draw:style-name="gr6" draw:text-style-name="P1" draw:layer="layout" svg:width="26.124cm" svg:height="0.963cm" svg:x="0.635cm" svg:y="0.942cm">
          <draw:text-box>
            <text:p>-- 8. spróbuj wyświetlić tytuły i ceny książek, które kosztują 65 zł - czy się udało? dlaczego?</text:p>
          </draw:text-box>
        </draw:frame>
        <draw:frame draw:style-name="gr2" draw:text-style-name="P2" draw:layer="layout" svg:width="19.599cm" svg:height="3.432cm" svg:x="3.175cm" svg:y="5.458cm">
          <draw:image xlink:href="Pictures/10000001000005C1000001028C50C4C5.png" xlink:type="simple" xlink:show="embed" xlink:actuate="onLoad" draw:mime-type="image/png">
            <text:p/>
          </draw:image>
        </draw:frame>
        <draw:frame draw:style-name="gr2" draw:text-style-name="P2" draw:layer="layout" svg:width="18.415cm" svg:height="4.431cm" svg:x="3.81cm" svg:y="10.795cm">
          <draw:image xlink:href="Pictures/10000001000004EB0000012F8CD6D1CE.png" xlink:type="simple" xlink:show="embed" xlink:actuate="onLoad" draw:mime-type="image/png">
            <text:p/>
          </draw:image>
        </draw:frame>
        <draw:frame draw:style-name="gr6" draw:text-style-name="P1" draw:layer="layout" svg:width="18.635cm" svg:height="0.963cm" svg:x="0.635cm" svg:y="8.89cm">
          <draw:text-box>
            <text:p>-- 9. utwórz indeks na kolumnie cena w rodzinie kolumn "ksiazki"</text:p>
          </draw:text-box>
        </draw:frame>
        <draw:frame draw:style-name="gr6" draw:text-style-name="P1" draw:layer="layout" svg:width="21.713cm" svg:height="0.963cm" svg:x="0.512cm" svg:y="9.832cm">
          <draw:text-box>
            <text:p>-- 10. spróbuj ponownie wyświetlić tytuły i ceny książek, które kosztują 65 zł</text:p>
          </draw:text-box>
        </draw:frame>
        <draw:frame draw:style-name="gr7" draw:text-style-name="P4" draw:layer="layout" svg:width="27.911cm" svg:height="1.673cm" svg:x="0.089cm" svg:y="3.81cm">
          <draw:text-box>
            <text:p>Polecenia nie można wykonać bez ALLOW FILTERING ponieważ nie można ocenić jego wpływu na wydajność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1" draw:layer="layout" svg:width="27.911cm" svg:height="0.963cm" svg:x="0.029cm" svg:y="0.635cm">
          <draw:text-box>
            <text:p>-- 11. spróbuj wyświetlić tytuły i ceny książek, których id_ksiazki jest większe od 3 - czy się udało?</text:p>
          </draw:text-box>
        </draw:frame>
        <draw:frame draw:style-name="gr2" draw:text-style-name="P2" draw:layer="layout" svg:width="27.999cm" svg:height="7.386cm" svg:x="0cm" svg:y="3.409cm">
          <draw:image xlink:href="Pictures/10000001000005B7000001822C57367E.png" xlink:type="simple" xlink:show="embed" xlink:actuate="onLoad" draw:mime-type="image/png">
            <text:p/>
          </draw:image>
        </draw:frame>
        <draw:frame draw:style-name="gr7" draw:text-style-name="P4" draw:layer="layout" svg:width="27.911cm" svg:height="1.673cm" svg:x="0.054cm" svg:y="1.608cm">
          <draw:text-box>
            <text:p>Polecenia nie można wykonać bez ALLOW FILTERING ponieważ nie można ocenić jego wpływu na wydajność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8" draw:text-style-name="P1" draw:layer="layout" svg:width="27.212cm" svg:height="2.385cm" svg:x="0.093cm" svg:y="0.79cm">
          <draw:text-box>
            <text:p>-- 12. do rodziny kolumn "ksiazki" dodaj superkolumnę id_autorow typu set&lt;int&gt;, która umożliwi</text:p>
            <text:p>-- powiązanie autorów z książką</text:p>
            <text:p/>
          </draw:text-box>
        </draw:frame>
        <draw:frame draw:style-name="gr9" draw:text-style-name="P5" draw:layer="layout" svg:width="22.225cm" svg:height="7.544cm" svg:x="1.27cm" svg:y="5.08cm">
          <draw:image xlink:href="Pictures/10000001000004770000018412F1778D.png" xlink:type="simple" xlink:show="embed" xlink:actuate="onLoad" draw:mime-type="image/png">
            <text:p/>
          </draw:image>
        </draw:frame>
        <draw:frame draw:style-name="gr6" draw:text-style-name="P1" draw:layer="layout" svg:width="20.891cm" svg:height="0.963cm" svg:x="0.093cm" svg:y="2.847cm">
          <draw:text-box>
            <text:p>-- 13. wyświetl strukturę rodziny kolumn "ksiazki" (polecenie DESCRIBE)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9" draw:text-style-name="P5" draw:layer="layout" svg:width="20.79cm" svg:height="9.525cm" svg:x="3.175cm" svg:y="3.81cm">
          <draw:image xlink:href="Pictures/10000001000005470000026B1F4D8585.png" xlink:type="simple" xlink:show="embed" xlink:actuate="onLoad" draw:mime-type="image/png">
            <text:p/>
          </draw:image>
        </draw:frame>
        <draw:frame draw:style-name="gr6" draw:text-style-name="P1" draw:layer="layout" svg:width="18.607cm" svg:height="0.963cm" svg:x="1.27cm" svg:y="0.942cm">
          <draw:text-box>
            <text:p>-- 14. do każdej książki przypisz listę identyfikatorów jej autorów:</text:p>
          </draw:text-box>
        </draw:frame>
        <draw:frame draw:style-name="gr6" draw:text-style-name="P1" draw:layer="layout" svg:width="20.122cm" svg:height="0.963cm" svg:x="1.27cm" svg:y="2.212cm">
          <draw:text-box>
            <text:p>-- 15. wyświetl tytuły i listy identyfikatorów autorów wszystkich książek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9" draw:text-style-name="P5" draw:layer="layout" svg:width="16.51cm" svg:height="13.51cm" svg:x="4.445cm" svg:y="1.73cm">
          <draw:image xlink:href="Pictures/10000001000005CE000004C04FA379BC.png" xlink:type="simple" xlink:show="embed" xlink:actuate="onLoad" draw:mime-type="image/png">
            <text:p/>
          </draw:image>
        </draw:frame>
        <draw:frame draw:style-name="gr6" draw:text-style-name="P1" draw:layer="layout" svg:width="19.905cm" svg:height="0.963cm" svg:x="2.32cm" svg:y="0.307cm">
          <draw:text-box>
            <text:p>-- 16. utwórz indeks na kolumnie id_autorow rodziny kolumn "ksiazki"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0" draw:text-style-name="P1" draw:layer="layout" svg:width="27.278cm" svg:height="3.096cm" svg:x="0.4cm" svg:y="0.714cm">
          <draw:text-box>
            <text:p>-- 17. Spróbuj odnaleźć tytuły książek, które napisał Thomas Howe. W tym celu najpierw znajdź</text:p>
            <text:p>-- identyfikator autora o takim imieniu i nazwisku, a następnie wyszukaj książkę, która posiada</text:p>
            <text:p>-- ten identyfikator w swojej kolumnie id_autorow</text:p>
            <text:p/>
          </draw:text-box>
        </draw:frame>
        <draw:frame draw:style-name="gr9" draw:text-style-name="P5" draw:layer="layout" svg:width="20.916cm" svg:height="3.095cm" svg:x="1.944cm" svg:y="3.81cm">
          <draw:image xlink:href="Pictures/10000001000006B4000000FE4732BECA.png" xlink:type="simple" xlink:show="embed" xlink:actuate="onLoad" draw:mime-type="image/png">
            <text:p/>
          </draw:image>
        </draw:frame>
        <draw:frame draw:style-name="gr9" draw:text-style-name="P5" draw:layer="layout" svg:width="24.13cm" svg:height="3.571cm" svg:x="1.27cm" svg:y="8.494cm">
          <draw:image xlink:href="Pictures/10000001000006B4000000FE10DE818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6" draw:text-style-name="P1" draw:layer="layout" svg:width="25.446cm" svg:height="0.963cm" svg:x="0.635cm" svg:y="0.942cm">
          <draw:text-box>
            <text:p>-- 18. posługując się poleceniem DESCRIBE wyświetl opis przestrzeni kluczy "biblioteka"</text:p>
          </draw:text-box>
        </draw:frame>
        <draw:frame draw:style-name="gr9" draw:text-style-name="P5" draw:layer="layout" svg:width="18.155cm" svg:height="13.405cm" svg:x="0.635cm" svg:y="1.835cm">
          <draw:image xlink:href="Pictures/10000001000008600000062FE86CA7DB.png" xlink:type="simple" xlink:show="embed" xlink:actuate="onLoad" draw:mime-type="image/png">
            <text:p/>
          </draw:image>
        </draw:frame>
        <draw:frame draw:style-name="gr9" draw:text-style-name="P5" draw:layer="layout" svg:width="11.43cm" svg:height="6.181cm" svg:x="15.875cm" svg:y="6.35cm">
          <draw:image xlink:href="Pictures/100000010000041E000001C154D9F3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1" draw:text-style-name="P1" draw:layer="layout" svg:width="27.525cm" svg:height="3.807cm" svg:x="0.475cm" svg:y="0.635cm">
          <draw:text-box>
            <text:p>-- 19. posługując się poleceniem COPY skopiuj zawartość kolumn id_ksiazki, tytul i cena rodziny</text:p>
            <text:p>-- kolumn "ksiazki" do pliku CSV; skorzystaj z dokumentacji</text:p>
            <text:p>-- http://docs.datastax.com/en/cql/3.1/cql/cql_reference/copy_r.html</text:p>
            <text:p>-- dlaczego?</text:p>
            <text:p/>
          </draw:text-box>
        </draw:frame>
        <draw:frame draw:style-name="gr9" draw:text-style-name="P5" draw:layer="layout" svg:width="23.495cm" svg:height="3.206cm" svg:x="1.905cm" svg:y="4.442cm">
          <draw:image xlink:href="Pictures/1000000100000653000000DDCF0071F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8" draw:text-style-name="P1" draw:layer="layout" svg:width="26.67cm" svg:height="3.095cm" svg:x="0cm" svg:y="0.635cm">
          <draw:text-box>
            <text:p>-- 20. utwórz nową rodzinę kolumn o nazwie "nowe_ksiazki" zawierającą kolumny: id_ksiazki (klucz</text:p>
            <text:p>-- główny), tytul, cena</text:p>
            <text:p/>
          </draw:text-box>
        </draw:frame>
        <draw:frame draw:style-name="gr9" draw:text-style-name="P5" draw:layer="layout" svg:width="13.78cm" svg:height="12.338cm" svg:x="7.81cm" svg:y="2.267cm">
          <draw:image xlink:href="Pictures/10000001000004AA0000042DDD9F3095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0" draw:text-style-name="P1" draw:layer="layout" svg:width="27.455cm" svg:height="3.096cm" svg:x="0.312cm" svg:y="0.714cm">
          <draw:text-box>
            <text:p>-- 21. posługując się poleceniem COPY wczytaj zawartość wcześniej utworzonego pliku CSV do</text:p>
            <text:p>-- rodziny kolumn "nowe_ksiazki"; skorzystaj z dokumentacji</text:p>
            <text:p>-- http://docs.datastax.com/en/cql/3.1/cql/cql_reference/copy_r.html</text:p>
            <text:p/>
          </draw:text-box>
        </draw:frame>
        <draw:frame draw:style-name="gr9" draw:text-style-name="P5" draw:layer="layout" svg:width="27.999cm" svg:height="3.593cm" svg:x="0.001cm" svg:y="4.027cm">
          <draw:image xlink:href="Pictures/10000001000006A2000000DAFC02B736.png" xlink:type="simple" xlink:show="embed" xlink:actuate="onLoad" draw:mime-type="image/png">
            <text:p/>
          </draw:image>
        </draw:frame>
        <draw:frame draw:style-name="gr6" draw:text-style-name="P1" draw:layer="layout" svg:width="16.41cm" svg:height="0.963cm" svg:x="0.635cm" svg:y="7.927cm">
          <draw:text-box>
            <text:p>-- 22. wyświetl zawartość rodziny kolumn "nowe_ksiazki"</text:p>
          </draw:text-box>
        </draw:frame>
        <draw:frame draw:style-name="gr9" draw:text-style-name="P5" draw:layer="layout" svg:width="19.838cm" svg:height="6.174cm" svg:x="2.387cm" svg:y="8.89cm">
          <draw:image xlink:href="Pictures/100000010000052200000199ABB583EB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6" draw:text-style-name="P1" draw:layer="layout" svg:width="11.929cm" svg:height="0.963cm" svg:x="0.635cm" svg:y="0.942cm">
          <draw:text-box>
            <text:p>-- 23. usuń przestrzeń kluczy "biblioteka"</text:p>
          </draw:text-box>
        </draw:frame>
        <draw:frame draw:style-name="gr9" draw:text-style-name="P5" draw:layer="layout" svg:width="20.848cm" svg:height="3.862cm" svg:x="3.615cm" svg:y="3.175cm">
          <draw:image xlink:href="Pictures/1000000100000314000000920D39349F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1T11:28:21.901704350</meta:creation-date>
    <dc:date>2026-05-31T12:47:19.594423479</dc:date>
    <meta:editing-duration>PT1H3M26S</meta:editing-duration>
    <meta:editing-cycles>39</meta:editing-cycles>
    <meta:generator>LibreOffice/25.8.5.2$Linux_X86_64 LibreOffice_project/580$Build-2</meta:generator>
    <meta:document-statistic meta:object-count="102"/>
  </office:meta>
</office:document-meta>
</file>